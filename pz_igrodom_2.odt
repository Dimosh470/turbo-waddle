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D00000362D3AC452B.png" manifest:media-type="image/png"/>
  <manifest:file-entry manifest:full-path="Pictures/1000000100000546000000B82944D6A6.png" manifest:media-type="image/png"/>
  <manifest:file-entry manifest:full-path="Pictures/10000001000004910000018612F84365.png" manifest:media-type="image/png"/>
  <manifest:file-entry manifest:full-path="Pictures/10000001000003A00000021538776D92.png" manifest:media-type="image/png"/>
  <manifest:file-entry manifest:full-path="Pictures/1000000100000408000001A31879E45E.png" manifest:media-type="image/png"/>
  <manifest:file-entry manifest:full-path="Pictures/1000000100000780000002E46ECA0563.png" manifest:media-type="image/png"/>
  <manifest:file-entry manifest:full-path="Pictures/10000001000002C400000088D1403138.png" manifest:media-type="image/png"/>
  <manifest:file-entry manifest:full-path="Pictures/10000001000005460000004F6635B1CB.png" manifest:media-type="image/png"/>
  <manifest:file-entry manifest:full-path="Pictures/1000000100000106000001CA476642D8.png" manifest:media-type="image/png"/>
  <manifest:file-entry manifest:full-path="Pictures/1000000100000545000001382083CEF3.png" manifest:media-type="image/png"/>
  <manifest:file-entry manifest:full-path="Pictures/1000000100000284000001208B000273.png" manifest:media-type="image/png"/>
  <manifest:file-entry manifest:full-path="Pictures/10000001000001FC0000008390C1A666.png" manifest:media-type="image/png"/>
  <manifest:file-entry manifest:full-path="Pictures/10000001000001F800000013586FF619.png" manifest:media-type="image/png"/>
  <manifest:file-entry manifest:full-path="Pictures/1000000100000542000002466B2A6A1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paragraph-properties fo:margin-top="0cm" fo:margin-bottom="0cm" style:contextual-spacing="false" fo:break-before="page"/>
    </style:style>
    <style:style style:name="P4" style:family="paragraph" style:parent-style-name="Heading_20_1">
      <style:paragraph-properties fo:text-align="start" style:justify-single-word="false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6"/>
    <style:style style:name="P7" style:family="paragraph" style:parent-style-name="List_20_Paragraph">
      <style:paragraph-properties fo:margin-left="3.314cm" fo:text-indent="0cm" style:auto-text-indent="false"/>
    </style:style>
    <style:style style:name="P8" style:family="paragraph" style:parent-style-name="List_20_Paragraph">
      <style:paragraph-properties fo:margin-left="1.27cm" fo:text-indent="0cm" style:auto-text-indent="false"/>
    </style:style>
    <style:style style:name="P9" style:family="paragraph" style:parent-style-name="List_20_Paragraph" style:list-style-name="WWNum17"/>
    <style:style style:name="P10" style:family="paragraph" style:parent-style-name="Standard">
      <style:paragraph-properties fo:text-align="center" style:justify-single-word="false" fo:text-indent="0cm" style:auto-text-indent="false"/>
    </style:style>
    <style:style style:name="P11" style:family="paragraph" style:parent-style-name="Standard" style:master-page-name="First_20_Page">
      <style:paragraph-properties fo:text-align="center" style:justify-single-word="false" fo:text-indent="0cm" style:auto-text-indent="false" style:page-number="auto"/>
    </style:style>
    <style:style style:name="P12" style:family="paragraph" style:parent-style-name="Standard">
      <style:paragraph-properties fo:text-align="center" style:justify-single-word="false" fo:keep-with-next="always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indent="0cm" style:auto-text-indent="false"/>
    </style:style>
    <style:style style:name="P15" style:family="paragraph" style:parent-style-name="Standard">
      <style:paragraph-properties fo:text-align="end" style:justify-single-word="false" fo:text-indent="0cm" style:auto-text-indent="false"/>
    </style:style>
    <style:style style:name="P16" style:family="paragraph" style:parent-style-name="Standard">
      <style:paragraph-properties fo:text-indent="0cm" style:auto-text-indent="false"/>
    </style:style>
    <style:style style:name="P17" style:family="paragraph" style:parent-style-name="Standard">
      <style:paragraph-properties fo:margin-left="1.249cm" fo:text-indent="1.251cm" style:auto-text-indent="false"/>
    </style:style>
    <style:style style:name="T1" style:family="text">
      <style:text-properties fo:font-weight="bold" style:font-weight-asian="bold" style:font-style-complex="italic"/>
    </style:style>
    <style:style style:name="T2" style:family="text">
      <style:text-properties text:display="true"/>
    </style:style>
    <style:style style:name="T3" style:family="text">
      <style:text-properties style:font-name="Calibri" fo:font-size="11pt" style:font-name-asian="F" style:font-size-asian="11pt" style:language-asian="ru" style:country-asian="RU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complex="Times New Roman1" style:font-size-complex="14pt"/>
    </style:style>
    <style:style style:name="T6" style:family="text">
      <style:text-properties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566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ОБРАЗОВАНИЯ СВЕРДЛОВСКОЙ ОБЛАСТИ ГОСУДАРСТВЕННОЕ АВТОНОМНОЕ ПРОФЕССИОНАЛЬНОЕ ОБРАЗОВАТЕЛЬНОЕ УЧРЕЖДЕНИЕ СВЕРДЛОВСКОЙ ОБЛАСТИ «ЕКАТЕРИНБУРГСКИЙ МОНТАЖНЫЙ КОЛЛЕДЖ»</text:p>
      <text:p text:style-name="P10"/>
      <text:p text:style-name="P10"/>
      <text:p text:style-name="P10"/>
      <text:p text:style-name="P10"/>
      <text:p text:style-name="P10"/>
      <text:p text:style-name="P10"/>
      <text:p text:style-name="P10">ИНДИВИДУАЛЬНЫЙ ПРОЕКТ </text:p>
      <text:p text:style-name="P10">на тему </text:p>
      <text:p text:style-name="P10">«<text:span text:style-name="T1">Разработка информационного веб-сайта<text:line-break/>“Сайт настольных игр ИГРОДОМ”»</text:span>» </text:p>
      <text:p text:style-name="P10">по специальности 09.02.07 «Информационные системы и программирование» (Разработчик веб и мультимедийных приложений)</text:p>
      <text:p text:style-name="P14"/>
      <text:p text:style-name="P10"/>
      <text:p text:style-name="P14"/>
      <text:p text:style-name="P14"/>
      <text:p text:style-name="P10"/>
      <text:p text:style-name="P15">Выполнил:</text:p>
      <text:p text:style-name="P15">студент гр. ИП-51</text:p>
      <text:p text:style-name="P15">Криворучко К.С.</text:p>
      <text:p text:style-name="P15">Проверил:</text:p>
      <text:p text:style-name="P15">Бутузов А.Л.</text:p>
      <text:p text:style-name="P10"/>
      <text:p text:style-name="P10"/>
      <text:p text:style-name="P10"/>
      <text:p text:style-name="P10">Екатеринбург – 2026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<text:soft-page-break/>Оглавление</text:p>
          </text:index-title>
          <text:p text:style-name="P1" loext:marker-style-name="T3"><text:a xlink:type="simple" xlink:href="#_Toc228811541" text:style-name="Index_20_Link" text:visited-style-name="Index_20_Link">ВВЕДЕНИЕ<text:span text:style-name="T2"><text:tab/>3</text:span></text:a></text:p>
          <text:p text:style-name="P1" loext:marker-style-name="T3"><text:a xlink:type="simple" xlink:href="#_Toc228811542" text:style-name="Index_20_Link" text:visited-style-name="Index_20_Link">Глава 1. Теоретическая часть<text:span text:style-name="T2"><text:tab/>4</text:span></text:a></text:p>
          <text:p text:style-name="P1" loext:marker-style-name="T3"><text:a xlink:type="simple" xlink:href="#_Toc228811543" text:style-name="Index_20_Link" text:visited-style-name="Index_20_Link">1.1 Цель и задачи<text:span text:style-name="T2"><text:tab/>4</text:span></text:a></text:p>
          <text:p text:style-name="P1" loext:marker-style-name="T3"><text:a xlink:type="simple" xlink:href="#_Toc228811544" text:style-name="Index_20_Link" text:visited-style-name="Index_20_Link">1.2 Анализ аналогичных ресурсов<text:span text:style-name="T2"><text:tab/>4</text:span></text:a></text:p>
          <text:p text:style-name="P1" loext:marker-style-name="T3"><text:a xlink:type="simple" xlink:href="#_Toc228811545" text:style-name="Index_20_Link" text:visited-style-name="Index_20_Link">1.3 Программы, используемые при разработке сайта<text:span text:style-name="T2"><text:tab/>6</text:span></text:a></text:p>
          <text:p text:style-name="P1" loext:marker-style-name="T3"><text:a xlink:type="simple" xlink:href="#_Toc228811546" text:style-name="Index_20_Link" text:visited-style-name="Index_20_Link">Глава 2. Проектная часть<text:span text:style-name="T2"><text:tab/>7</text:span></text:a></text:p>
          <text:p text:style-name="P1" loext:marker-style-name="T3"><text:a xlink:type="simple" xlink:href="#_Toc228811547" text:style-name="Index_20_Link" text:visited-style-name="Index_20_Link">2.1 Физическая структура<text:span text:style-name="T2"><text:tab/>7</text:span></text:a></text:p>
          <text:p text:style-name="P1" loext:marker-style-name="T3"><text:a xlink:type="simple" xlink:href="#_Toc228811548" text:style-name="Index_20_Link" text:visited-style-name="Index_20_Link">2.2 Цветовая гамма сайта<text:span text:style-name="T2"><text:tab/>8</text:span></text:a></text:p>
          <text:p text:style-name="P1" loext:marker-style-name="T3"><text:a xlink:type="simple" xlink:href="#_Toc228811549" text:style-name="Index_20_Link" text:visited-style-name="Index_20_Link">2.3 Описание блоков сайта<text:span text:style-name="T2"><text:tab/>9</text:span></text:a></text:p>
          <text:p text:style-name="P1" loext:marker-style-name="T3"><text:a xlink:type="simple" xlink:href="#_Toc228811550" text:style-name="Index_20_Link" text:visited-style-name="Index_20_Link">2.4 Элементы кода сайта<text:span text:style-name="T2"><text:tab/>11</text:span></text:a></text:p>
          <text:p text:style-name="P1" loext:marker-style-name="T3"><text:a xlink:type="simple" xlink:href="#_Toc228811551" text:style-name="Index_20_Link" text:visited-style-name="Index_20_Link">2.5 Осуществление навигации по сайту<text:span text:style-name="T2"><text:tab/>12</text:span></text:a></text:p>
          <text:p text:style-name="P1" loext:marker-style-name="T3"><text:a xlink:type="simple" xlink:href="#_Toc228811552" text:style-name="Index_20_Link" text:visited-style-name="Index_20_Link">Глава 3. Готовый результат<text:span text:style-name="T2"><text:tab/>13</text:span></text:a></text:p>
          <text:p text:style-name="P1" loext:marker-style-name="T3"><text:a xlink:type="simple" xlink:href="#_Toc228811553" text:style-name="Index_20_Link" text:visited-style-name="Index_20_Link">3.1 Функциональные возможности реализованного проекта<text:span text:style-name="T2"><text:tab/>13</text:span></text:a></text:p>
          <text:p text:style-name="P1" loext:marker-style-name="T3"><text:a xlink:type="simple" xlink:href="#_Toc228811554" text:style-name="Index_20_Link" text:visited-style-name="Index_20_Link">3.2 Тестирование и проверка работоспособности созданного сайта<text:span text:style-name="T2"><text:tab/>13</text:span></text:a></text:p>
          <text:p text:style-name="P1" loext:marker-style-name="T3"><text:a xlink:type="simple" xlink:href="#_Toc228811555" text:style-name="Index_20_Link" text:visited-style-name="Index_20_Link">ЗАКЛЮЧЕНИЕ<text:span text:style-name="T2"><text:tab/>15</text:span></text:a></text:p>
          <text:p text:style-name="P1" loext:marker-style-name="T3"><text:a xlink:type="simple" xlink:href="#_Toc228811556" text:style-name="Index_20_Link" text:visited-style-name="Index_20_Link">СПИСОК ЛИТЕРАТУРЫ<text:span text:style-name="T2"><text:tab/>16</text:span></text:a></text:p>
          <text:p text:style-name="Standard"/>
        </text:index-body>
      </text:table-of-content>
      <text:p text:style-name="P14"/>
      <text:h text:style-name="P3" text:outline-level="1"><text:bookmark-start text:name="_Toc228811541"/>ВВЕДЕНИЕ<text:bookmark-end text:name="_Toc228811541"/></text:h>
      <text:p text:style-name="Standard">Выбор темы проекта (“Сайт настольных игр «ИГРОДОМ»”) обусловлен тем, что в последнее время настольные игры набирают популярность среди разных поколений – от детей до взрослых людей. Во времена цифровых технологий, настольные игры собирают людей за одним столом. Это не просто развлечение, а инструмент для живого общения с друзьями и родными, способ расслабиться после тяжелого дня, а также один из вариантов получения положительных эмоций. Настольные игры являются инструментом для развития памяти, логического мышления и креативности. Именно поэтому создание удобного интернет-магазина, где каждый сможет подобрать игру по душе – является актуальным направлением.</text:p>
      <text:h text:style-name="P3" text:outline-level="1"><text:bookmark-start text:name="_Toc228811542"/>Глава 1. Теоретическая часть<text:bookmark-end text:name="_Toc228811542"/></text:h>
      <text:h text:style-name="P4" text:outline-level="1"><text:bookmark-start text:name="_Toc228811543"/>1.1 Цель и задачи<text:bookmark-end text:name="_Toc228811543"/></text:h>
      <text:p text:style-name="Standard">Целью работы является создание многостраничного сайта «ИГРОДОМ» с использованием современных технологий верстки сайтов.</text:p>
      <text:p text:style-name="Standard">Задачи:</text:p>
      <text:list text:style-name="WWNum1">
        <text:list-item>
          <text:p text:style-name="P5">Анализ данных: изучить сторонние интернет-магазины. </text:p>
        </text:list-item>
        <text:list-item>
          <text:p text:style-name="P5">Проектирование: разработать структуру страниц и макет интерфейса в едином стиле.</text:p>
        </text:list-item>
        <text:list-item>
          <text:p text:style-name="P5">Разработка: создать страницы сайта с использованием <text:span text:style-name="T4">HTML</text:span>5 и <text:span text:style-name="T4">CSS</text:span>.</text:p>
        </text:list-item>
        <text:list-item>
          <text:p text:style-name="P5">Тестирование: проверить работоспособность навигации и корректность отображения наполнения на разных устройствах.</text:p>
        </text:list-item>
      </text:list>
      <text:p text:style-name="Standard">Предметом исследования является совокупность решений, применяемых при создании многостраничного веб-сайта настольных игр.</text:p>
      <text:p text:style-name="Standard">В настольные игры играют люди разных возрастов. <text:s/>Это происходит во всех странах мира, Россия не является исключением. Теперь это не просто детское развлечение, а полноценный досуг. Это связано с рядом причин: настольные игры играют важную социальную функцию. Благодаря им, семьи и компании друзей собираются в одном месте и играют, развивая коммуникативные навыки. Также причиной является появление новых издательств настольных игр. Иногда интернет-магазины продают некачественные настольные игры или продают слишком дорого. Поэтому было принято решение создать сайт для нового интернет-магазина с доступными ценами, а также качественной продукцией. </text:p>
      <text:h text:style-name="P4" text:outline-level="1"><text:bookmark-start text:name="_Toc228811544"/>1.2 Анализ аналогичных ресурсов<text:bookmark-end text:name="_Toc228811544"/></text:h>
      <text:p text:style-name="Standard">Чтобы новый интернет-магазин «ИГРОДОМ» пользовался популярностью, имел удобный интерфейс и запоминающийся вид, надо провести анализ других сайтов настольных игр. Также важно выделить сильные и слабые стороны, чтобы учесть их при разработке собственного сайта. В качестве сайтов конкурентов были выбраны две компании, являющиеся <text:soft-page-break/>лидерами рынка, имеющие многолетнюю историю и обширную аудиторию – «Hobby Games» и «Мосигра». </text:p>
      <text:p text:style-name="Standard">Шапки этих сайтов содержат в себе логотип, поисковую строку, действия для пользователей (авторизация, избранное, корзина). (Рис. 1.1)</text:p>
      <text:p text:style-name="P12"><draw:frame draw:style-name="fr1" draw:name="Рисунок 1" text:anchor-type="as-char" svg:width="15cm" svg:height="2.044cm" draw:z-index="0"><draw:image xlink:href="Pictures/1000000100000546000000B82944D6A6.png" xlink:type="simple" xlink:show="embed" xlink:actuate="onLoad" draw:mime-type="image/png"/></draw:frame></text:p>
      <text:p text:style-name="P13">Рис. 1.1 Шапка сайта Мосигра</text:p>
      <text:p text:style-name="Standard">Одним из недостатков: шапка сайта не является закрепленной. Из-за этого необходимо пролистывать страницу сайта наверх для того, чтобы вернуться на главную. </text:p>
      <text:p text:style-name="Standard">Информация о доставке (Рис. 1.2) и об оплате (Рис. 1.3) на рассматриваемых сайтах предоставлена сплошным тексом, что усложняет процесс нахождения нужной информации. </text:p>
      <text:p text:style-name="P12"><draw:frame draw:style-name="fr2" draw:name="Рисунок 6" text:anchor-type="as-char" svg:width="12cm" svg:height="6.615cm" draw:z-index="1"><draw:image xlink:href="Pictures/10000001000003A00000021538776D92.png" xlink:type="simple" xlink:show="embed" xlink:actuate="onLoad" draw:mime-type="image/png"/></draw:frame></text:p>
      <text:p text:style-name="P13">Рис. 1.2 Страница доставки сайта Мосигра</text:p>
      <text:p text:style-name="P12"><draw:frame draw:style-name="fr1" draw:name="Рисунок 9" text:anchor-type="as-char" svg:width="12cm" svg:height="4.002cm" draw:z-index="2"><draw:image xlink:href="Pictures/10000001000004910000018612F84365.png" xlink:type="simple" xlink:show="embed" xlink:actuate="onLoad" draw:mime-type="image/png"/></draw:frame></text:p>
      <text:p text:style-name="P13">Рис. 1.3 Страница оплаты сайта H<text:span text:style-name="T4">obby</text:span> <text:span text:style-name="T4">Games</text:span></text:p>
      <text:p text:style-name="Standard"><text:soft-page-break/>Еще один из недостатков: отсутствие страницы с вопросами на частые вопросы. Случается такое, что человек впервые выбирает настольную игру и у него появляется множество вопросов. На них может ответить только поддержка. Для удобства можно создать страницу с популярными вопросами, для экономии времени пользователя. </text:p>
      <text:h text:style-name="P4" text:outline-level="1"><text:bookmark-start text:name="_Toc228811545"/>1.3 Программы, используемые при разработке сайта<text:bookmark-end text:name="_Toc228811545"/></text:h>
      <text:p text:style-name="Standard">Для создания сайта использовались следующие программы: <text:span text:style-name="T4">Visual</text:span> <text:span text:style-name="T4">Studio</text:span> <text:span text:style-name="T4">Code</text:span>, <text:span text:style-name="T4">Yandex</text:span>, <text:span text:style-name="T4">Figma</text:span>.</text:p>
      <text:p text:style-name="Standard"><text:span text:style-name="T4">Visual</text:span> <text:span text:style-name="T4">Studio</text:span> <text:span text:style-name="T4">Code</text:span> использовался для написания кода <text:span text:style-name="T4">HTML</text:span> (HyperText Markup Language) и <text:span text:style-name="T4">CSS</text:span> (Cascading Style Sheets). Выбор этой программы обусловлен наличием инструментов, облегчающих работу начинающим программистам: подсветка синтаксиса, автодополнение тегов и свойств.</text:p>
      <text:p text:style-name="Standard"><text:span text:style-name="T4">Yandex</text:span> был выбран как средство тестирования и отладки сайта. Программа использовалась исходя из личного опыта, а также стабильности работы.</text:p>
      <text:p text:style-name="Standard"><text:span text:style-name="T4">Figma</text:span> использовалась на этапе подготовки для создания визуальной концепции будущего сайта.</text:p>
      <text:h text:style-name="P3" text:outline-level="1"><text:bookmark-start text:name="_Toc228811546"/>Глава 2. Проектная часть<text:bookmark-end text:name="_Toc228811546"/></text:h>
      <text:p text:style-name="Standard">Перед созданием сайта, важно создать макет будущего продукта. Для веб-сайта настольных игр лучше использовать блочную структуру для быстрой навигации по сайту через иконки и названия. (Рис. 2.1)</text:p>
      <text:p text:style-name="P13"><draw:frame draw:style-name="fr1" draw:name="Рисунок 13" text:anchor-type="as-char" svg:width="15cm" svg:height="5.784cm" draw:z-index="3"><draw:image xlink:href="Pictures/1000000100000780000002E46ECA0563.png" xlink:type="simple" xlink:show="embed" xlink:actuate="onLoad" draw:mime-type="image/png"/><svg:desc>C:\Users\user\Downloads\макет.png</svg:desc></draw:frame>Рис. 2.1 Макет сайта</text:p>
      <text:h text:style-name="P4" text:outline-level="1"><text:bookmark-start text:name="_Toc228811547"/>2.1 Физическая структура<text:bookmark-end text:name="_Toc228811547"/></text:h>
      <text:p text:style-name="Standard">Физическая структура сайта представляет собой иерархическую систему организации файлов и папок, обеспечивающую логичное хранение и доступ к ресурсам проекта. Все файлы структурированы по типу и назначению, что упрощает поддержку и дальнейшее развитие сайта. (Рис. 2.2)</text:p>
      <text:p text:style-name="P12"><text:soft-page-break/><draw:frame draw:style-name="fr1" draw:name="Рисунок 15" text:anchor-type="as-char" svg:width="5.332cm" svg:height="9.999cm" draw:z-index="4"><draw:image xlink:href="Pictures/10000001000001CD00000362D3AC452B.png" xlink:type="simple" xlink:show="embed" xlink:actuate="onLoad" draw:mime-type="image/png"/><svg:desc>C:\Users\user\Downloads\структура.png</svg:desc></draw:frame></text:p>
      <text:p text:style-name="P13">Рис. 2.2 Физическая структура</text:p>
      <text:p text:style-name="Standard">В системе HTML-файлы всех страниц: igrodom.html (главная), nastol_game.html (каталог), popular.html (акции), card.carcassonne.html (карточка товара), dostavka.html (доставка), voprosy.html (вопросы и ответы), about.html (о нас) и 404.html (страница ошибки).</text:p>
      <text:p text:style-name="Standard">Для стилей выделена папка css/, в которой находятся отдельные CSS-файлы для каждой страницы: style.css, nastol_game.css, popular.css, card.carcassonne.css, dostavka.css, voprosy.css, about.css, 404.css. Такое разделение ускоряет загрузку сайта и упрощает внесение изменений.</text:p>
      <text:p text:style-name="Standard">Все изображения организованы в папке image/. Это обеспечивает быстрый поиск файлов.</text:p>
      <text:p text:style-name="Standard">Проект также подключает внешнюю библиотеку иконок Font Awesome. Благодаря продуманной структуре сайт удобен для дальнейшего сопровождения и масштабирования.</text:p>
      <text:h text:style-name="P4" text:outline-level="1"><text:bookmark-start text:name="_Toc228811548"/>2.2 Цветовая гамма сайта<text:bookmark-end text:name="_Toc228811548"/></text:h>
      <text:p text:style-name="Standard">Цветовая гамма сайта построена на сочетании контрастных цветов: акцентного красного, темно-синего, а также нейтральных светлых и серых <text:soft-page-break/>оттенков. Такое решение было принято для обеспечения хорошей читаемости, уменьшения нагрузки для зрения и запоминания фирменного стиля. </text:p>
      <text:p text:style-name="Standard">Основные цвета, использованные на сайте (Рис. 2.3)</text:p>
      <text:p text:style-name="Standard"><draw:frame draw:style-name="fr1" draw:name="Рисунок 14" text:anchor-type="as-char" svg:width="15cm" svg:height="2.873cm" draw:z-index="5"><draw:image xlink:href="Pictures/10000001000002C400000088D1403138.png" xlink:type="simple" xlink:show="embed" xlink:actuate="onLoad" draw:mime-type="image/png"/><svg:desc>C:\Users\user\Downloads\ЦВЕТОВАЯ ГАММА САЙТА (1).png</svg:desc></draw:frame></text:p>
      <text:p text:style-name="P13">Рис. 2.3 Цветовая гамма сайта</text:p>
      <text:p text:style-name="Standard">Основной фон(#<text:span text:style-name="T4">ffffff</text:span>): белый – используется <text:s/>в качестве основного цвета сайта, фона карточек товара и большинства блоков. Светлый фон обеспечивает максимальную контрастность текста для комфортного чтения.</text:p>
      <text:p text:style-name="Standard">Фон навигации и подвала(#264653): темно-синий – применяется для фона навигационного меню (<text:span text:style-name="T4">nav</text:span>) и подвала сайта (<text:span text:style-name="T4">footer</text:span>). Это визуально отделяет служебные элементы от основного контента. </text:p>
      <text:p text:style-name="Standard">Цвет основного текста(#212529): черно-серый – выбран для заголовков, названий товаров и основного текста. Цвет является универсальным и привычным для многих пользователей. </text:p>
      <text:p text:style-name="Standard">Вспомогательный текст(#6<text:span text:style-name="T4">c</text:span>757<text:span text:style-name="T4">d</text:span>): приглушенный серый – используется для текста, который является описанием продукции. Визуально отделяет не ключевые данные от основной информации, позволяя фокусироваться на главном.</text:p>
      <text:p text:style-name="Standard">Цвет границ и рамок(#<text:span text:style-name="T4">dee</text:span>2<text:span text:style-name="T4">e</text:span>6): светло-серый – используется для обрамления карточек товаров, разделяющих элементов. Помогает создать аккуратные границы без лишнего контраста.</text:p>
      <text:p text:style-name="Standard">Акцентный красный цвет(#<text:span text:style-name="T4">e</text:span>63946) – основной цвет сайта. Он привлекает внимание к важным элементам, стимулируя к совершению действий. <text:s/></text:p>
      <text:h text:style-name="P4" text:outline-level="1"><text:bookmark-start text:name="_Toc228811549"/>2.3 Описание блоков сайта<text:bookmark-end text:name="_Toc228811549"/></text:h>
      <text:p text:style-name="Standard">Интерфейс сайта «ИГРОДОМ» разделен на несколько функциональных блоков, которые повторяются на всех страницах для подержания единой стилистики и удобства использования.</text:p>
      <text:p text:style-name="Standard"><text:soft-page-break/>Верхняя панель (<text:span text:style-name="T4">header)</text:span></text:p>
      <text:p text:style-name="Standard">Данная панель расположена сверху страницы и является закрепленной. Она включает в себя три элемента: логотип, поисковую строку и блок для действий пользователя. При нажатии на логотип интернет-магазина пользователь перенаправляется на главную страницу, что позволяет в любой момент оказаться в начале сайта. (Рис. 2.4)</text:p>
      <text:p text:style-name="P12"><draw:frame draw:style-name="fr1" draw:name="Рисунок 4" text:anchor-type="as-char" svg:width="15cm" svg:height="0.878cm" draw:z-index="6"><draw:image xlink:href="Pictures/10000001000005460000004F6635B1CB.png" xlink:type="simple" xlink:show="embed" xlink:actuate="onLoad" draw:mime-type="image/png"/></draw:frame></text:p>
      <text:p text:style-name="P13">Рис. 2.4 Шапка сайта</text:p>
      <text:p text:style-name="Standard">Навигационное меню (<text:span text:style-name="T4">nav</text:span>)</text:p>
      <text:p text:style-name="Standard">Меню находится прямо под верхней панелью и является закрепленной. Оно содержит ссылки на основные разделы сайта. При наведении курсора на любой раздел появляется красное подчеркивание. </text:p>
      <text:p text:style-name="Standard">Сетка карточек (<text:span text:style-name="T4">product</text:span>-<text:span text:style-name="T4">grid</text:span>)</text:p>
      <text:p text:style-name="Standard">Ключевой элемент веб-страницы, сетка автоматически распределяет карточки товаров по колонкам с фиксированным расстоянием. Это позволяет выстроить большое количеств элементов в столбцы. (Рис. 2.5)</text:p>
      <text:p text:style-name="P12"><draw:frame draw:style-name="fr1" draw:name="Рисунок 5" text:anchor-type="as-char" svg:width="15cm" svg:height="6.089cm" draw:z-index="7"><draw:image xlink:href="Pictures/1000000100000408000001A31879E45E.png" xlink:type="simple" xlink:show="embed" xlink:actuate="onLoad" draw:mime-type="image/png"/></draw:frame></text:p>
      <text:p text:style-name="P13">Рис. 2.5 Сетка товаров</text:p>
      <text:p text:style-name="Standard">Информационная карточка товара (product-card)</text:p>
      <text:p text:style-name="Standard">Универсальный самостоятельный блок, отображающий всю основную информацию об игре. Карточка включает в себя: изображение, название, характеристики (количество игроков, среднее время игры, рекомендуемый возраст участников), рейтинг и кнопки действий. (Рис. 2.6)</text:p>
      <text:p text:style-name="P12"><text:soft-page-break/><draw:frame draw:style-name="fr1" draw:name="Рисунок 2" text:anchor-type="as-char" svg:width="5.72cm" svg:height="9.999cm" draw:z-index="8"><draw:image xlink:href="Pictures/1000000100000106000001CA476642D8.png" xlink:type="simple" xlink:show="embed" xlink:actuate="onLoad" draw:mime-type="image/png"/></draw:frame></text:p>
      <text:p text:style-name="P13">Рис. 2.6 Карточка товара</text:p>
      <text:p text:style-name="Standard">Подвал сайта (<text:span text:style-name="T4">footer</text:span>)</text:p>
      <text:p text:style-name="Standard">Подвал расположен в нижней части каждой страницы и содержит четыре колонки информации: игродом, помощь, каталог, контакты. Также присутствует строка с копирайтом, которая отделена от основного содержимого тонкой серой линией. (Рис. 2.7)</text:p>
      <text:p text:style-name="P12"><draw:frame draw:style-name="fr1" draw:name="Рисунок 3" text:anchor-type="as-char" svg:width="15cm" svg:height="3.47cm" draw:z-index="9"><draw:image xlink:href="Pictures/1000000100000545000001382083CEF3.png" xlink:type="simple" xlink:show="embed" xlink:actuate="onLoad" draw:mime-type="image/png"/></draw:frame></text:p>
      <text:p text:style-name="P13">Рис. 2.7 Подвал сайта</text:p>
      <text:h text:style-name="P4" text:outline-level="1"><text:bookmark-start text:name="_Toc228811550"/>2.4 Элементы кода сайта<text:bookmark-end text:name="_Toc228811550"/></text:h>
      <text:p text:style-name="Standard">Для отображения товаров на сайте используется блочная верстка. Каждый товар представлен в виде карточки, находящейся в контейнере класса <text:span text:style-name="T4">product</text:span>-<text:span text:style-name="T4">card</text:span>. Внутри карточки располагаются изображение товара, название, цена и кнопки для взаимодействия. (Рис. 2.8)</text:p>
      <text:p text:style-name="P12"><text:soft-page-break/><draw:frame draw:style-name="fr1" draw:name="Рисунок 7" text:anchor-type="as-char" svg:width="15cm" svg:height="6.706cm" draw:z-index="10"><draw:image xlink:href="Pictures/1000000100000284000001208B000273.png" xlink:type="simple" xlink:show="embed" xlink:actuate="onLoad" draw:mime-type="image/png"/></draw:frame></text:p>
      <text:p text:style-name="P13">Рис. 2.8 Пример кода карточки товара</text:p>
      <text:p text:style-name="Standard">Для автоматического распределения карточек товара по странице применен модуль <text:span text:style-name="T4">CSS</text:span> <text:span text:style-name="T4">Grid</text:span> <text:span text:style-name="T4">Layout</text:span>. Код задает количество колонок, минимальную ширину каждой карточки и расстояние между ними. (Рис. 2.9)</text:p>
      <text:p text:style-name="P13"><draw:frame draw:style-name="fr1" draw:name="Рисунок 8" text:anchor-type="as-char" svg:width="13cm" svg:height="3.351cm" draw:z-index="11"><draw:image xlink:href="Pictures/10000001000001FC0000008390C1A666.png" xlink:type="simple" xlink:show="embed" xlink:actuate="onLoad" draw:mime-type="image/png"/></draw:frame></text:p>
      <text:p text:style-name="P13">Рис. 2.9 Пример кода сетки товаров</text:p>
      <text:h text:style-name="P4" text:outline-level="1"><text:bookmark-start text:name="_Toc228811551"/>2.5 Осуществление навигации по сайту<text:bookmark-end text:name="_Toc228811551"/></text:h>
      <text:p text:style-name="P17">Навигация по интернет-магазину «ИГРОДОМ» реализована с помощью взаимосвязанных элементов, обеспечивающих удобное перемещение пользователя между страницами и разделами. Все навигационные элементы выполнены в едином стиле и доступны на каждой странице. </text:p>
      <text:p text:style-name="P17">Навигация может осуществляться через: основное навигационное меню, логотип, подвал сайта, карточки товара.</text:p>
      <text:p text:style-name="P17">Каждое средство навигации обернуто в гиперссылку &lt;<text:span text:style-name="T4">a</text:span>&gt;, что делает его кликабельным. </text:p>
      <text:p text:style-name="P17"><text:soft-page-break/>Текстовый логотип «ИГРОДОМ» в шапке (Рис. 2.4) одна из активных ссылок. При нажатии на него пользователь перемещается на главную страницу. (Рис. 2.10)</text:p>
      <text:p text:style-name="P12"><draw:frame draw:style-name="fr1" draw:name="Рисунок 11" text:anchor-type="as-char" svg:width="14cm" svg:height="0.527cm" draw:z-index="12"><draw:image xlink:href="Pictures/10000001000001F800000013586FF619.png" xlink:type="simple" xlink:show="embed" xlink:actuate="onLoad" draw:mime-type="image/png"/></draw:frame></text:p>
      <text:p text:style-name="P13">Рис. 2.10 Пример кликабельности логотипа</text:p>
      <text:p text:style-name="P13"/>
      <text:h text:style-name="P3" text:outline-level="1"><text:bookmark-start text:name="_Toc228811552"/>Глава 3. Готовый результат<text:bookmark-end text:name="_Toc228811552"/></text:h>
      <text:h text:style-name="P4" text:outline-level="1"><text:bookmark-start text:name="_Toc228811553"/>3.1 Функциональные возможности реализованного проекта<text:bookmark-end text:name="_Toc228811553"/></text:h>
      <text:p text:style-name="Standard">В результате выполнения практической части работы был разработан полноценный, многостраничный веб-ресурс «ИГРОДОМ». В сайте соблюдены и исправлены недочёты, выявленные при анализе аналогов конкурентов. Новый интернет-магазин представляет собой понятный интерфейс, адаптированный для комфортного чтения и быстрого поиска информации. (Рис. 3.1)</text:p>
      <text:p text:style-name="P13"><draw:frame draw:style-name="fr1" draw:name="Рисунок 10" text:anchor-type="as-char" svg:width="15cm" svg:height="6.488cm" draw:z-index="13"><draw:image xlink:href="Pictures/1000000100000542000002466B2A6A17.png" xlink:type="simple" xlink:show="embed" xlink:actuate="onLoad" draw:mime-type="image/png"/></draw:frame></text:p>
      <text:p text:style-name="P13">Рис. 3.1 Главная страница сайта ИГРОДОМ</text:p>
      <text:p text:style-name="Standard">Навигационные возможности: пользователь <text:s/>может перемещаться по сайту как через основное меню, так и через логотип сайта, подвал, карточки товара.</text:p>
      <text:p text:style-name="Standard">Отображение каталога товаров: товары предоставлены в виде карточек, каждая из которых содержит изображение, название и кнопки для взаимодействия. Сетка товаров автоматически подстраивается под ширину экрана. </text:p>
      <text:p text:style-name="Standard">Визуальные и интерактивные возможности: при наведении курсора на карточки товаров и кнопки происходят плавные изменения (подъём, изменение цвета).</text:p>
      <text:h text:style-name="P4" text:outline-level="1"><text:bookmark-start text:name="_Toc228811554"/>3.2 Тестирование и проверка работоспособности созданного сайта<text:bookmark-end text:name="_Toc228811554"/></text:h>
      <text:p text:style-name="Standard">В ходе завершающего этапа разработки было проведено тестирование сайта в современных браузерах (<text:span text:style-name="T6">Google Chrome, Яндекс.Браузер</text:span>). </text:p>
      <text:p text:style-name="Standard">Проверка показала: </text:p>
      <text:list text:style-name="WWNum16">
        <text:list-item>
          <text:p text:style-name="P6"><text:soft-page-break/>Все информационное и графическое наполнение отображается корректно. </text:p>
        </text:list-item>
        <text:list-item>
          <text:p text:style-name="P6">Все гиперссылки и переходы между страницами работают.</text:p>
        </text:list-item>
        <text:list-item>
          <text:p text:style-name="P6">Фиксированные элементы, остаются на своем месте при прокрутке.</text:p>
        </text:list-item>
      </text:list>
      <text:p text:style-name="P7"/>
      <text:h text:style-name="P3" text:outline-level="1"><text:bookmark-start text:name="_Toc228811555"/>ЗАКЛЮЧЕНИЕ<text:bookmark-end text:name="_Toc228811555"/></text:h>
      <text:p text:style-name="Standard">В ходе работы над проектом был создан многостраничный сайт «ИГРОДОМ» – интернет-магазин настольных игр, целью которого является предоставление пользователям удобного и стильного ресурса. В рамках работы были собраны данные о популярных играх, новинках.</text:p>
      <text:p text:style-name="Standard">Для воплощения данного проекта были использованы и освоены современные технологии верстки. С помощью <text:span text:style-name="T4">CSS</text:span> была разработана единая цветовая гамма, добавлены плавные анимации и тени. Благодаря ему сайт передает атмосферу уюта и привлекает внимание к ключевым элементам.</text:p>
      <text:p text:style-name="Standard">Итогом работы стала настройка навигации сайту с помощью ссылок, с ее помощью можно перемещаться между всеми разделами: главной страницей, каталогом, карточкой товара, страницей доставки, вопросами и ответами, страницей о нас и странице ошибки 404. Страница «ошибка 404» создана специально, чтобы сообщить посетителю сайта: страница находится в разработке, пока можете посетить другие страницы.</text:p>
      <text:p text:style-name="Standard">Цель работы достигнута, все поставленные задачи выполнены. Это значит, что продукт завершен и готов для использования. В перспективном будущем проект «ИГРОДОМ» будет расширен за счет добавления функционала корзины, личного кабинета пользователя, интеграции с платежными системами и подключения базы данных для управления ассортиментом, а также добавлением адаптивности для разных видов устройств.</text:p>
      <text:h text:style-name="P3" text:outline-level="1"><text:bookmark-start text:name="_Toc228811556"/>СПИСОК ЛИТЕРАТУРЫ<text:bookmark-end text:name="_Toc228811556"/></text:h>
      <text:list text:style-name="WWNum17">
        <text:list-item>
          <text:p text:style-name="P9"><text:span text:style-name="T4">htmlbook</text:span>.<text:span text:style-name="T4">ru</text:span> — <text:span text:style-name="T5">URL</text:span><text:span text:style-name="T6">: </text:span><text:a xlink:type="simple" xlink:href="https://htmlbook.ru/" text:style-name="Internet_20_link" text:visited-style-name="Visited_20_Internet_20_Link"><text:span text:style-name="Internet_20_link"><text:span text:style-name="T5">https</text:span></text:span><text:span text:style-name="Internet_20_link"><text:span text:style-name="T6">://</text:span></text:span><text:span text:style-name="Internet_20_link"><text:span text:style-name="T5">htmlbook</text:span></text:span><text:span text:style-name="Internet_20_link"><text:span text:style-name="T6">.</text:span></text:span><text:span text:style-name="Internet_20_link"><text:span text:style-name="T5">ru</text:span></text:span><text:span text:style-name="Internet_20_link"><text:span text:style-name="T6">/</text:span></text:span></text:a><text:span text:style-name="T6"> Дата обращения: </text:span><text:bookmark-start text:name="_GoBack"/><text:span text:style-name="T6">18.03.2026</text:span><text:bookmark-end text:name="_GoBack"/></text:p>
        </text:list-item>
        <text:list-item>
          <text:p text:style-name="P9"><text:span text:style-name="T4">W</text:span>3<text:span text:style-name="T4">schoools</text:span> — Веб Учебники на Русском — <text:span text:style-name="T5">URL</text:span><text:span text:style-name="T6">: </text:span><text:a xlink:type="simple" xlink:href="https://www.schoolsw3.com/index.php" text:style-name="Internet_20_link" text:visited-style-name="Visited_20_Internet_20_Link"><text:span text:style-name="Internet_20_link"><text:span text:style-name="T6">https://www.schoolsw3.com/index.php</text:span></text:span></text:a><text:span text:style-name="T6"> Дата обращения: 31.03.2026</text:span></text:p>
        </text:list-item>
        <text:list-item>
          <text:p text:style-name="P9">Магазины настольных игр <text:span text:style-name="T4">Hobby</text:span> <text:span text:style-name="T4">Games</text:span> — <text:span text:style-name="T5">URL</text:span><text:span text:style-name="T6">: </text:span><text:a xlink:type="simple" xlink:href="https://hobbygames.ru/" text:style-name="Internet_20_link" text:visited-style-name="Visited_20_Internet_20_Link"><text:span text:style-name="Internet_20_link"><text:span text:style-name="T6">https://hobbygames.ru/</text:span></text:span></text:a><text:span text:style-name="T6"> Дата обращения: 01.04.2026</text:span></text:p>
        </text:list-item>
        <text:list-item>
          <text:p text:style-name="P9">Мосигра – интернет-магазин настольных игр и товаров для хобби — <text:span text:style-name="T5">URL</text:span><text:span text:style-name="T6">: </text:span><text:a xlink:type="simple" xlink:href="https://www.mosigra.ru/" text:style-name="Internet_20_link" text:visited-style-name="Visited_20_Internet_20_Link"><text:span text:style-name="Internet_20_link"><text:span text:style-name="T5">https</text:span></text:span><text:span text:style-name="Internet_20_link"><text:span text:style-name="T6">://</text:span></text:span><text:span text:style-name="Internet_20_link"><text:span text:style-name="T5">www</text:span></text:span><text:span text:style-name="Internet_20_link"><text:span text:style-name="T6">.</text:span></text:span><text:span text:style-name="Internet_20_link"><text:span text:style-name="T5">mosigra</text:span></text:span><text:span text:style-name="Internet_20_link"><text:span text:style-name="T6">.</text:span></text:span><text:span text:style-name="Internet_20_link"><text:span text:style-name="T5">ru</text:span></text:span><text:span text:style-name="Internet_20_link"><text:span text:style-name="T6">/</text:span></text:span></text:a><text:span text:style-name="T6"> Дата обращения: 01.04.2026</text:span></text:p>
        </text:list-item>
        <text:list-item>
          <text:p text:style-name="P9"><text:span text:style-name="T6">Названия цветов и оттенков </text:span>— <text:span text:style-name="T5">URL</text:span><text:span text:style-name="T6">: </text:span><text:a xlink:type="simple" xlink:href="https://get-color.ru/" text:style-name="Internet_20_link" text:visited-style-name="Visited_20_Internet_20_Link"><text:span text:style-name="Internet_20_link"><text:span text:style-name="T6">https://get-color.ru/</text:span></text:span></text:a><text:span text:style-name="T6"> Дата обращения: 05.03.2026</text:span></text:p>
        </text:list-item>
        <text:list-item>
          <text:p text:style-name="P9"><text:span text:style-name="T6">Интересные факты о настольных играх </text:span>— <text:span text:style-name="T5">URL</text:span><text:span text:style-name="T6">: <text:s/></text:span><text:a xlink:type="simple" xlink:href="https://dzen.ru/" text:style-name="Internet_20_link" text:visited-style-name="Visited_20_Internet_20_Link"><text:span text:style-name="Internet_20_link"><text:span text:style-name="T6">https://dzen.ru/</text:span></text:span></text:a><text:span text:style-name="T6"> Дата обращения: 03.04.2026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15%" fo:text-align="start" style:justify-single-word="false" fo:text-indent="0cm" style:auto-text-indent="false"/>
      <style:text-properties style:language-asian="ru" style:country-asian="RU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Заголовок_20_1_20_Знак" style:display-name="Заголовок 1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_20__28_WW_29_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ge_20_number" style:display-name="page number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2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9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0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4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2" style:num-suffix=".2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2" style:num-suffix=".2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0.794cm" fo:margin-left="2.044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 text:start-value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14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8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5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24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94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64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34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04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Пользователь</meta:initial-creator>
    <dc:creator>Пользователь</dc:creator>
    <meta:editing-cycles>11</meta:editing-cycles>
    <meta:creation-date>2026-04-14T07:43:00</meta:creation-date>
    <dc:date>2026-05-04T14:42:00</dc:date>
    <meta:editing-duration>PT9H26M</meta:editing-duration>
    <meta:generator>LibreOffice/7.6.4.1$Windows_X86_64 LibreOffice_project/e19e193f88cd6c0525a17fb7a176ed8e6a3e2aa1</meta:generator>
    <meta:document-statistic meta:table-count="0" meta:image-count="14" meta:object-count="0" meta:page-count="17" meta:paragraph-count="140" meta:word-count="1740" meta:character-count="13737" meta:non-whitespace-character-count="12093"/>
    <meta:user-defined meta:name="AppVersion">14.0000</meta:user-defined>
    <meta:template xlink:type="simple" xlink:actuate="onRequest" xlink:title="Normal.dotm" xlink:href=""/>
  </office:meta>
</office:document-meta>
</file>